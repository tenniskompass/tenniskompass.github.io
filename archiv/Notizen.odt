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ks:</text:p>
      <text:p text:style-name="Standard"/>
      <text:p text:style-name="Standard"><text:a xlink:type="simple" xlink:href="https://tenniseltern.com/tools-organsiation/" text:style-name="Internet_20_link" text:visited-style-name="Visited_20_Internet_20_Link">https://tenniseltern.com/tools-organsiation/</text:a></text:p>
      <text:p text:style-name="Standard"/>
      <text:p text:style-name="Standard"/>
      <text:p text:style-name="Standard"/>
      <text:p text:style-name="Standard">Ideen: </text:p>
      <text:p text:style-name="Standard">an der seite anzeige welche grandslams turniere laufen vielleicht ein count down wann sie star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uda </meta:initial-creator>
    <meta:creation-date>2026-04-21T14:07:49</meta:creation-date>
    <meta:document-statistic meta:table-count="0" meta:image-count="0" meta:object-count="0" meta:page-count="1" meta:paragraph-count="4" meta:word-count="18" meta:character-count="154"/>
    <dc:date>2026-04-21T14:09:04</dc:date>
    <dc:creator>Houda </dc:creator>
    <meta:editing-duration>PT1M16S</meta:editing-duration>
    <meta:editing-cycles>1</meta:editing-cycles>
    <meta:generator>OpenOffice/4.1.16$Unix OpenOffice.org_project/4116m3$Build-9816</meta:generator>
  </office:meta>
</office:document-meta>
</file>